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8000002CB2D15A8AC15A81DBE.png" manifest:media-type="image/png"/>
  <manifest:file-entry manifest:full-path="Pictures/100000000000065B000001F27F2479512C16AFFC.png" manifest:media-type="image/png"/>
  <manifest:file-entry manifest:full-path="Pictures/100000000000066200000208B09732340E8FD8C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monospace" svg:font-family="monospace"/>
  </office:font-face-decls>
  <office:automatic-styles>
    <style:style style:name="P1" style:family="paragraph" style:parent-style-name="Standard">
      <style:text-properties officeooo:rsid="000c3218" officeooo:paragraph-rsid="000c3218"/>
    </style:style>
    <style:style style:name="P2" style:family="paragraph" style:parent-style-name="Standard">
      <style:paragraph-properties fo:text-align="center" style:justify-single-word="false"/>
      <style:text-properties fo:color="#fc5c00" loext:opacity="100%" officeooo:rsid="000c3218" officeooo:paragraph-rsid="000c3218"/>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0c3218"/>
    </style:style>
    <style:style style:name="P5" style:family="paragraph" style:parent-style-name="Standard">
      <style:text-properties officeooo:rsid="000d545a" officeooo:paragraph-rsid="000d545a"/>
    </style:style>
    <style:style style:name="P6" style:family="paragraph" style:parent-style-name="Standard">
      <style:text-properties officeooo:rsid="00108fdc" officeooo:paragraph-rsid="00108fdc"/>
    </style:style>
    <style:style style:name="P7" style:family="paragraph" style:parent-style-name="Standard">
      <style:text-properties officeooo:rsid="00128eed" officeooo:paragraph-rsid="00128eed"/>
    </style:style>
    <style:style style:name="P8" style:family="paragraph" style:parent-style-name="Standard">
      <style:text-properties officeooo:rsid="00108fdc" officeooo:paragraph-rsid="00108fdc"/>
    </style:style>
    <style:style style:name="P9" style:family="paragraph" style:parent-style-name="Standard">
      <style:text-properties officeooo:rsid="00108fdc" officeooo:paragraph-rsid="0012f9b3"/>
    </style:style>
    <style:style style:name="P10" style:family="paragraph" style:parent-style-name="Standard">
      <style:paragraph-properties fo:margin-left="0in" fo:margin-right="0in" fo:margin-top="0in" fo:margin-bottom="0in" style:contextual-spacing="false" fo:text-indent="0in" style:auto-text-indent="false" style:writing-mode="lr-tb"/>
    </style:style>
    <style:style style:name="T1" style:family="text">
      <style:text-properties officeooo:rsid="000c3218"/>
    </style:style>
    <style:style style:name="T2" style:family="text">
      <style:text-properties officeooo:rsid="000d545a"/>
    </style:style>
    <style:style style:name="T3" style:family="text">
      <style:text-properties officeooo:rsid="0012f9b3"/>
    </style:style>
    <style:style style:name="T4" style:family="text">
      <style:text-properties style:font-name="Google Sans" fo:font-size="12pt" fo:font-weight="bold" loext:padding="0in" loext:border="none"/>
    </style:style>
    <style:style style:name="T5" style:family="text">
      <style:text-properties style:font-name="Google Sans" fo:font-size="12pt" style:text-underline-style="solid" style:text-underline-width="auto" style:text-underline-color="font-color" fo:font-weight="bold" loext:padding="0in" loext:border="none"/>
    </style:style>
    <style:style style:name="T6" style:family="text">
      <style:text-properties style:font-name="Google Sans" fo:font-size="12pt" fo:font-weight="normal" loext:padding="0in" loext:border="none"/>
    </style:style>
    <style:style style:name="T7" style:family="text">
      <style:text-properties style:font-name="Google Sans" fo:font-size="15pt" fo:font-weight="bold" loext:padding="0in" loext:border="none"/>
    </style:style>
    <style:style style:name="T8" style:family="text">
      <style:text-properties style:font-name="monospace" fo:font-size="10.5pt" fo:font-weight="normal" loext:padding-left="0in" loext:padding-right="0in" loext:padding-top="0in" loext:padding-bottom="0.0193in" loext:border-left="none" loext:border-right="none" loext:border-top="none" loext:border-bottom="0.06pt solid #f3f5f6"/>
    </style:style>
    <style:style style:name="T9" style:family="text">
      <style:text-properties style:font-name="monospace" fo:font-size="10.5pt" fo:font-weight="normal" loext:padding="0in" loext:border="none"/>
    </style:style>
    <style:style style:name="T10" style:family="text">
      <style:text-properties style:font-name="monospace" fo:font-size="10.5pt" fo:font-weight="normal" officeooo:rsid="0012f9b3"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ft********************</text:p>
      <text:p text:style-name="P3"><text:span text:style-name="Strong_20_Emphasis">Amplitude Shift Keying (ASK) </text:span><text:span text:style-name="Strong_20_Emphasis"><text:span text:style-name="T1">Raspberry Pi</text:span></text:span></text:p>
      <text:p text:style-name="P4"><text:span text:style-name="Strong_20_Emphasis"><text:span text:style-name="T1">07/2</text:span></text:span><text:span text:style-name="Strong_20_Emphasis"><text:span text:style-name="T3">2</text:span></text:span><text:span text:style-name="Strong_20_Emphasis"><text:span text:style-name="T1">/26</text:span></text:span></text:p>
      <text:p text:style-name="P2">********************Draft********************</text:p>
      <text:p text:style-name="P2"/>
      <text:p text:style-name="P6">could n<text:span text:style-name="T3">ot</text:span> fork this repo <text:a xlink:type="simple" xlink:href="https://github.com/hallard/RadioHead.git" text:style-name="Internet_20_link" text:visited-style-name="Visited_20_Internet_20_Link">https://github.com/hallard/RadioHead.git</text:a></text:p>
      <text:p text:style-name="P6"><text:span text:style-name="T3">now included in </text:span><text:a xlink:type="simple" xlink:href="https://github.com/develone/raspi-ask-433-tests" text:style-name="Internet_20_link" text:visited-style-name="Visited_20_Internet_20_Link">https://github.com/develone/raspi-ask-433-tests</text:a></text:p>
      <text:p text:style-name="P6"/>
      <text:p text:style-name="P6">To use the <text:span text:style-name="Strong_20_Emphasis"><text:span text:style-name="T4">RadioHead</text:span></text:span> ASK (Amplitude Shift Keying) library for a 433/315 MHz receiver on a Raspberry Pi in C, you must rely on the wrapper for the underlying C++ library and the <text:span text:style-name="Source_20_Text"><text:span text:style-name="T8">bcm2835</text:span></text:span> hardware driver. However, due to the Pi's multitasking OS, it cannot handle the strict, cycle-accurate bit-banging required for basic ASK, so you must use hardware-accelerated modules like the <text:span text:style-name="Strong_20_Emphasis"><text:span text:style-name="T4">RFM69</text:span></text:span> or <text:span text:style-name="Strong_20_Emphasis"><text:span text:style-name="T4">RFM95</text:span></text:span></text:p>
      <text:p text:style-name="P6"><text:span text:style-name="Strong_20_Emphasis"><text:span text:style-name="T4">Because the standard ASK classes in the </text:span></text:span><text:a xlink:type="simple" xlink:href="https://www.airspayce.com/mikem/arduino/RadioHead/" office:target-frame-name="_blank" xlink:show="new" text:style-name="Internet_20_link" text:visited-style-name="Visited_20_Internet_20_Link"><text:span text:style-name="Strong_20_Emphasis"><text:span text:style-name="T5">RadioHead Packet Radio Library</text:span></text:span></text:a><text:span text:style-name="Strong_20_Emphasis"><text:span text:style-name="T4"> were originally designed for microcontrollers with dedicated timers, using cheap ASK receivers (like the FS1000A) natively on the Raspberry Pi often results in poor performance. Instead, connecting an Arduino to your Pi via USB/Serial to do the radio heavy-lifting is the community's preferred workaround</text:span></text:span></text:p>
      <text:p text:style-name="P6"><text:span text:style-name="Strong_20_Emphasis"><text:span text:style-name="T4"/></text:span></text:p>
      <text:p text:style-name="P6"><text:span text:style-name="Strong_20_Emphasis"><text:span text:style-name="T7">Setting Up the Environment (RFM Modules)</text:span></text:span></text:p>
      <text:p text:style-name="P10"><text:span text:style-name="T6">If you are using a supported module (e.g., RFM69) wired to the Pi's SPI pins, you will need to compile the C++ example using the </text:span><text:span text:style-name="Source_20_Text"><text:span text:style-name="T8">bcm2835</text:span></text:span><text:span text:style-name="T6"> library</text:span></text:p>
      <text:p text:style-name="P9"><text:span text:style-name="Strong_20_Emphasis"><text:span text:style-name="T9">cd bcm2835-1.</text:span></text:span><text:span text:style-name="Strong_20_Emphasis"><text:span text:style-name="T10">75</text:span></text:span><text:span text:style-name="Strong_20_Emphasis"><text:span text:style-name="T9"> </text:span></text:span></text:p>
      <text:p text:style-name="P9"><text:span text:style-name="Strong_20_Emphasis"><text:span text:style-name="T9">./configure make</text:span></text:span></text:p>
      <text:p text:style-name="P9"><text:span text:style-name="Strong_20_Emphasis"><text:span text:style-name="T9">sudo make check </text:span></text:span></text:p>
      <text:p text:style-name="P9"><text:span text:style-name="Strong_20_Emphasis"><text:span text:style-name="T9">sudo make install</text:span></text:span></text:p>
      <text:p text:style-name="P6"/>
      <text:p text:style-name="P6">Repo <text:a xlink:type="simple" xlink:href="https://github.com/develone/raspi-ask-433-tests" text:style-name="Internet_20_link" text:visited-style-name="Visited_20_Internet_20_Link">https://github.com/develone/raspi-ask-433-tests</text:a></text:p>
      <text:p text:style-name="P6"/>
      <text:p text:style-name="P1">transmitter</text:p>
      <text:p text:style-name="P1">sudo apt update</text:p>
      <text:p text:style-name="P1">sudo apt-get install pigpio</text:p>
      <text:p text:style-name="P1"/>
      <text:p text:style-name="P1">gcc -Wall -pthread -o ask_transmitter ask_transmitter.c -lpigpio -lrt</text:p>
      <text:p text:style-name="P1"/>
      <text:p text:style-name="P1">devel@pi4-50:~/test-ask-C $ sudo ./ask_transmitter</text:p>
      <text:p text:style-name="P1"/>
      <text:p text:style-name="P5">receiver</text:p>
      <text:p text:style-name="P5">Requires WiringPi <text:a xlink:type="simple" xlink:href="https://github.com/WiringPi/WiringPi.git" text:style-name="Internet_20_link" text:visited-style-name="Visited_20_Internet_20_Link">https://github.com/WiringPi/WiringPi.git</text:a></text:p>
      <text:p text:style-name="P5">git clone <text:a xlink:type="simple" xlink:href="https://github.com/WiringPi/WiringPi.git" text:style-name="Internet_20_link" text:visited-style-name="Visited_20_Internet_20_Link">https://github.com/WiringPi/WiringPi.git</text:a></text:p>
      <text:p text:style-name="P5">cd WiringPi</text:p>
      <text:p text:style-name="P5">./build</text:p>
      <text:p text:style-name="P5"/>
      <text:p text:style-name="P5">gcc -o ask_receiver ask_receiver.c -lwiringPi</text:p>
      <text:p text:style-name="P5">devel@pi4-50:~/test-ask-C $ sudo ./ask_receiver</text:p>
      <text:p text:style-name="P5"/>
      <text:p text:style-name="P5">transmitter</text:p>
      <text:p text:style-name="P1"><draw:frame draw:style-name="fr2" draw:name="Image1" text:anchor-type="char" svg:width="6.6929in" svg:height="2.1299in" draw:z-index="0"><draw:image xlink:href="Pictures/100000000000066200000208B09732340E8FD8C5.png" xlink:type="simple" xlink:show="embed" xlink:actuate="onLoad" draw:mime-type="image/png"/></draw:frame><text:soft-page-break/></text:p>
      <text:p text:style-name="P1"><text:s text:c="80"/><text:span text:style-name="T2">receiver</text:span></text:p>
      <text:p text:style-name="P1"><draw:frame draw:style-name="fr2" draw:name="Image2" text:anchor-type="char" svg:width="6.6929in" svg:height="2.0484in" draw:z-index="1"><draw:image xlink:href="Pictures/100000000000065B000001F27F2479512C16AFFC.png" xlink:type="simple" xlink:show="embed" xlink:actuate="onLoad" draw:mime-type="image/png"/></draw:frame></text:p>
      <text:p text:style-name="P7">pi-connector</text:p>
      <text:p text:style-name="P7"/>
      <text:p text:style-name="P7"><draw:frame draw:style-name="fr1" draw:name="Image3" text:anchor-type="char" svg:width="3.4535in" svg:height="3.0272in" draw:z-index="2"><draw:image xlink:href="Pictures/1000000000000318000002CB2D15A8AC15A81DB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Needs number of char sent</text:p>
      <text:p text:style-name="P5">Needs a CRC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21T04:29:32.835322337</meta:creation-date>
    <dc:date>2026-07-22T16:36:00.084633361</dc:date>
    <meta:editing-duration>PT45M47S</meta:editing-duration>
    <meta:editing-cycles>6</meta:editing-cycles>
    <meta:generator>LibreOffice/7.4.7.2$Linux_AARCH64 LibreOffice_project/40$Build-2</meta:generator>
    <meta:document-statistic meta:table-count="0" meta:image-count="3" meta:object-count="0" meta:page-count="2" meta:paragraph-count="32" meta:word-count="234" meta:character-count="1881" meta:non-whitespace-character-count="1596"/>
  </office:meta>
</office:document-meta>
</file>